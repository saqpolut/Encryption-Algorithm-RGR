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пиляция</text:p>
      <text:p text:style-name="P1">#!/bin/bash</text:p>
      <text:p text:style-name="P1"/>
      <text:p text:style-name="P1"># Создание директорий</text:p>
      <text:p text:style-name="P1">mkdir -p obj lib bin</text:p>
      <text:p text:style-name="P1"/>
      <text:p text:style-name="P1">echo "=== Компиляция объектных файлов ==="</text:p>
      <text:p text:style-name="P1"/>
      <text:p text:style-name="P1"># Основные файлы</text:p>
      <text:p text:style-name="P1">g++ -c Vineger_Scytale_main.cpp -o obj/main.o -fPIC</text:p>
      <text:p text:style-name="P1">g++ -c menu.cpp -o obj/menu.o -fPIC</text:p>
      <text:p text:style-name="P1">g++ -c cipher_loader.cpp -o obj/cipher_loader.o -fPIC</text:p>
      <text:p text:style-name="P1">g++ -c utils.cpp -o obj/utils.o -fPIC</text:p>
      <text:p text:style-name="P1">g++ -c key_manager.cpp -o obj/key_manager.o -fPIC</text:p>
      <text:p text:style-name="P1"/>
      <text:p text:style-name="P1"># Плагин Виженера</text:p>
      <text:p text:style-name="P1">g++ -c vigener_plugin.cpp -o obj/vigener_plugin.o -fPIC</text:p>
      <text:p text:style-name="P1">g++ -c vigener_impl.cpp -o obj/vigener_impl.o -fPIC</text:p>
      <text:p text:style-name="P1"/>
      <text:p text:style-name="P1"># Плагин Скитала</text:p>
      <text:p text:style-name="P1">g++ -c skitala_plugin.cpp -o obj/skitala_plugin.o -fPIC</text:p>
      <text:p text:style-name="P1">g++ -c skitala_impl.cpp -o obj/skitala_impl.o -fPIC</text:p>
      <text:p text:style-name="P1"/>
      <text:p text:style-name="P1">echo "=== Сборка основного приложения ==="</text:p>
      <text:p text:style-name="P1">g++ obj/main.o obj/menu.o obj/cipher_loader.o obj/utils.o obj/key_manager.o -o bin/encryption -ldl</text:p>
      <text:p text:style-name="P1"/>
      <text:p text:style-name="P1">echo "=== Сборка плагинов ==="</text:p>
      <text:p text:style-name="P1">g++ -shared obj/vigener_plugin.o obj/vigener_impl.o -o bin/libvigenere.so</text:p>
      <text:p text:style-name="P1">g++ -shared obj/skitala_plugin.o obj/skitala_impl.o -o bin/libskitala.so</text:p>
      <text:p text:style-name="P1"/>
      <text:p text:style-name="P1">echo "=== Готово! ==="</text:p>
      <text:p text:style-name="P1">echo "Запуск: ./encryption"</text:p>
      <text:p text:style-name="P1"/>
      <text:p text:style-name="P1"/>
      <text:p text:style-name="P1"/>
      <text:p text:style-name="P1">Encryption-Algorithm-RGR/</text:p>
      <text:p text:style-name="P1">├── obj/ <text:s text:c="21"/># Все .o файлы здесь</text:p>
      <text:p text:style-name="P1">│ <text:s text:c="2"/>├── main.o</text:p>
      <text:p text:style-name="P1">│ <text:s text:c="2"/>├── menu.o</text:p>
      <text:p text:style-name="P1">│ <text:s text:c="2"/>├── cipher_loader.o</text:p>
      <text:p text:style-name="P1">│ <text:s text:c="2"/>├── utils.o</text:p>
      <text:p text:style-name="P1">│ <text:s text:c="2"/>├── key_manager.o</text:p>
      <text:p text:style-name="P1">│ <text:s text:c="2"/>├── vigener_plugin.o</text:p>
      <text:p text:style-name="P1">│ <text:s text:c="2"/>├── vigener_impl.o</text:p>
      <text:p text:style-name="P1">│ <text:s text:c="2"/>├── skitala_plugin.o</text:p>
      <text:p text:style-name="P1">│ <text:s text:c="2"/>└── skitala_impl.o</text:p>
      <text:p text:style-name="P1">├── lib/ <text:s text:c="21"/># .so файлы</text:p>
      <text:p text:style-name="P1">│ <text:s text:c="2"/>├── libvigenere.so</text:p>
      <text:p text:style-name="P1">│ <text:s text:c="2"/>└── libskitala.so</text:p>
      <text:p text:style-name="P1">├── bin/ <text:s text:c="21"/># Исполняемый файл</text:p>
      <text:p text:style-name="P1">│ <text:s text:c="2"/>└── encryption</text:p>
      <text:p text:style-name="P1">└── (исходные файлы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4:30:31.321537654</meta:creation-date>
    <dc:date>2026-06-12T14:40:19.509737869</dc:date>
    <meta:editing-duration>PT9M49S</meta:editing-duration>
    <meta:editing-cycles>1</meta:editing-cycles>
    <meta:document-statistic meta:table-count="0" meta:image-count="0" meta:object-count="0" meta:page-count="1" meta:paragraph-count="41" meta:word-count="175" meta:character-count="1378" meta:non-whitespace-character-count="1157"/>
    <meta:generator>LibreOffice/24.2.7.2$Linux_X86_64 LibreOffice_project/420$Build-2</meta:generator>
  </office:meta>
</office:document-meta>
</file>